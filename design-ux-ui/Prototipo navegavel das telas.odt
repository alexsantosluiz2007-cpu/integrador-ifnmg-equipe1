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2327" officeooo:paragraph-rsid="000e2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ótipo navegável das telas</text:p>
      <text:p text:style-name="Standard"/>
      <text:p text:style-name="Text_20_body">Link para seu acesso:</text:p>
      <text:p text:style-name="Text_20_body"><text:a xlink:type="simple" xlink:href="https://www.canva.com/design/DAHNw_SOK8I/C8QGWrQvwlJQVLpGiUoozg/view?utm_content=DAHNw_SOK8I&amp;utm_campaign=designshare&amp;utm_medium=link&amp;utm_source=viewer" text:style-name="Internet_20_link" text:visited-style-name="Visited_20_Internet_20_Link">https://www.canva.com/design/DAHNw_SOK8I/C8QGWrQvwlJQVLpGiUoozg/view?utm_content=DAHNw_SOK8I&amp;utm_campaign=designshare&amp;utm_medium=link&amp;utm_source=viewer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egoe UI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2T03:16:19.252017600</meta:creation-date>
    <dc:date>2026-07-02T03:23:34.047383700</dc:date>
    <meta:editing-duration>PT7M14S</meta:editing-duration>
    <meta:editing-cycles>3</meta:editing-cycles>
    <meta:generator>LibreOffice/26.2.4.2$Windows_X86_64 LibreOffice_project/0229ac93fcf0d7cbc6376066c6f35021cef002dc</meta:generator>
    <meta:document-statistic meta:table-count="0" meta:image-count="0" meta:object-count="0" meta:page-count="1" meta:paragraph-count="3" meta:word-count="9" meta:character-count="201" meta:non-whitespace-character-count="195"/>
  </office:meta>
</office:document-meta>
</file>